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598000007EA533A675F.jpg" manifest:media-type="image/jpeg"/>
  <manifest:file-entry manifest:full-path="Pictures/1000000000000598000007EA1B3962E6.jpg" manifest:media-type="image/jpeg"/>
  <manifest:file-entry manifest:full-path="Pictures/1000000000000598000007EABB7DDBAD.jpg" manifest:media-type="image/jpeg"/>
  <manifest:file-entry manifest:full-path="Pictures/1000000000000598000007EA0A688512.jpg" manifest:media-type="image/jpeg"/>
  <manifest:file-entry manifest:full-path="Pictures/1000000000000598000007EAEF9A5467.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Noto Sans" svg:font-family="'Noto Sans'" style:font-family-generic="roman" style:font-pitch="variable"/>
    <style:font-face style:name="Noto Sans JP" svg:font-family="'Noto Sans JP'" style:font-family-generic="system" style:font-pitch="variable"/>
    <style:font-face style:name="Tahoma" svg:font-family="Tahoma"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 style:family="graphic" style:parent-style-name="standard">
      <style:graphic-properties draw:fill="solid" draw:fill-color="#ffffd7" draw:textarea-horizontal-align="left" draw:textarea-vertical-align="middle" draw:auto-grow-height="true" fo:min-height="0cm" fo:min-width="0cm" fo:padding-left="0cm" fo:wrap-option="wrap" loext:decorative="false"/>
      <style:paragraph-properties style:writing-mode="lr-tb"/>
    </style:style>
    <style:style style:name="P1" style:family="paragraph">
      <loext:graphic-properties draw:fill="none"/>
    </style:style>
    <style:style style:name="P2" style:family="paragraph">
      <style:paragraph-properties fo:margin-top="0.42cm" fo:margin-bottom="0.35cm" fo:text-align="left"/>
      <style:text-properties style:font-name="Microsoft YaHei" fo:font-size="10pt" style:font-name-asian="Microsoft YaHei" style:font-size-asian="10pt" style:font-size-complex="10pt"/>
    </style:style>
    <style:style style:name="P3" style:family="paragraph">
      <loext:graphic-properties draw:fill="solid" draw:fill-color="#ffffd7"/>
      <style:paragraph-properties fo:margin-top="0.42cm" fo:margin-bottom="0.35cm" fo:text-align="left"/>
      <style:text-properties style:font-name="Microsoft YaHei" fo:font-size="10pt" style:font-name-asian="Microsoft YaHei" style:font-size-asian="10pt" style:font-size-complex="10pt"/>
    </style:style>
    <style:style style:name="P4" style:family="paragraph">
      <style:paragraph-properties fo:margin-top="0.42cm" fo:margin-bottom="0.35cm" fo:text-align="left"/>
      <style:text-properties fo:font-size="10pt" style:font-size-asian="10pt" style:font-size-complex="10pt"/>
    </style:style>
    <style:style style:name="T1" style:family="text">
      <style:text-properties style:font-name="Microsoft YaHei" style:font-name-asian="Microsoft YaHei"/>
    </style:style>
    <style:style style:name="T2" style:family="text">
      <style:text-properties style:font-name="Microsoft YaHei" fo:font-weight="bold" style:font-name-asian="Microsoft YaHei" style:font-weight-asian="bold" style:font-weight-complex="bold"/>
    </style:style>
    <style:style style:name="T3" style:family="text">
      <style:text-properties style:font-name="Microsoft YaHei" fo:font-size="10pt" style:font-name-asian="Microsoft YaHei"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18.185cm" svg:height="25.729cm" svg:x="3.61cm" svg:y="-0.003cm">
          <draw:image xlink:href="Pictures/1000000000000598000007EA1B3962E6.jpg" xlink:type="simple" xlink:show="embed" xlink:actuate="onLoad" draw:mime-type="image/jpeg">
            <text:p/>
          </draw:image>
        </draw:frame>
        <draw:custom-shape draw:style-name="gr2" draw:text-style-name="P3" draw:layer="layout" svg:width="5.96cm" svg:height="3.019cm" svg:x="0.316cm" svg:y="4.469cm">
          <text:p text:style-name="P2"><text:span text:style-name="T1">Z</text:span><text:span text:style-name="T1">社是总部，</text:span><text:span text:style-name="T1">L</text:span><text:span text:style-name="T1">社等是子公司。各公司通过 </text:span><text:span text:style-name="T1">VPN </text:span><text:span text:style-name="T1">使用总部的共用系统，同时也有自己的内部系统。系统由外包开发，</text:span><text:span text:style-name="T2">共用系统</text:span><text:span text:style-name="T1">由总部管理，各公司的电脑、服务器和</text:span><text:span text:style-name="T2">内部系统</text:span><text:span text:style-name="T1">由各自管理。 </text:span></text:p>
          <draw:enhanced-geometry svg:viewBox="0 0 21600 21600" draw:text-areas="800 800 20800 20800" draw:type="round-rectangular-callout" draw:modifiers="21393.4574735783 27801.0596026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page>
      <draw:page draw:name="page2" draw:style-name="dp1" draw:master-page-name="master-page3">
        <draw:frame draw:style-name="gr1" draw:text-style-name="P1" draw:layer="layout" svg:width="18.185cm" svg:height="25.729cm" svg:x="4cm" svg:y="0cm">
          <draw:image xlink:href="Pictures/1000000000000598000007EABB7DDBAD.jpg" xlink:type="simple" xlink:show="embed" xlink:actuate="onLoad" draw:mime-type="image/jpeg">
            <text:p/>
          </draw:image>
        </draw:frame>
        <draw:custom-shape draw:style-name="gr2" draw:text-style-name="P3" draw:layer="layout" svg:width="5.96cm" svg:height="2.517cm" svg:x="0.116cm" svg:y="0.421cm">
          <text:p text:style-name="P4"><text:span text:style-name="T1">利用部署在网络边界的防火墙（</text:span><text:span text:style-name="T1">FW</text:span><text:span text:style-name="T1">）过滤来自互联网的访问，只允许符合条件的通信进入内部网络，所以采用的是“境界防御”的思想。 </text:span></text:p>
          <draw:enhanced-geometry svg:viewBox="0 0 21600 21600" draw:text-areas="800 800 20800 20800" draw:type="round-rectangular-callout" draw:modifiers="21393.4574735783 31190.4686258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5.96cm" svg:height="3.927cm" svg:x="0.461cm" svg:y="6.253cm">
          <text:p text:style-name="P4"><text:span text:style-name="T1">対策</text:span><text:span text:style-name="T1">2</text:span><text:span text:style-name="T1">： 安装恶意软件防护软件，防止恶意软件感染。 </text:span></text:p>
          <text:p text:style-name="P4"><text:span text:style-name="T1">対策</text:span><text:span text:style-name="T1">3</text:span><text:span text:style-name="T1">： 定期确认漏洞信息，及时打补丁和更新。 </text:span></text:p>
          <text:p text:style-name="P4"><text:span text:style-name="T1">対策</text:span><text:span text:style-name="T1">4</text:span><text:span text:style-name="T1">： 上线前进行漏洞诊断，修复后再投入使用。</text:span></text:p>
          <draw:enhanced-geometry svg:viewBox="0 0 21600 21600" draw:text-areas="800 800 20800 20800" draw:type="round-rectangular-callout" draw:modifiers="21393.4574735783 23871.079429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5.96cm" svg:height="2.517cm" svg:x="0.116cm" svg:y="0.422cm">
          <text:p text:style-name="P4"><text:span text:style-name="T1">利用部署在网络边界的防火墙（</text:span><text:span text:style-name="T1">FW</text:span><text:span text:style-name="T1">）过滤来自互联网的访问，只允许符合条件的通信进入内部网络，所以采用的是“境界防御”的思想。 </text:span></text:p>
          <draw:enhanced-geometry svg:viewBox="0 0 21600 21600" draw:text-areas="800 800 20800 20800" draw:type="round-rectangular-callout" draw:modifiers="21393.4574735783 31190.4686258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5.96cm" svg:height="3.877cm" svg:x="0.461cm" svg:y="14.479cm">
          <text:p text:style-name="P4"><text:span text:style-name="T1">供应链攻击！</text:span></text:p>
          <text:p text:style-name="P4"><text:span text:style-name="T1">业务 → 攻击合作伙伴（子公司、供应商） </text:span></text:p>
          <text:p text:style-name="P4"><text:span text:style-name="T1">服务 → 攻击云服务</text:span><text:span text:style-name="T1">/IT </text:span><text:span text:style-name="T1">服务商 </text:span></text:p>
          <text:p text:style-name="P4"><text:span text:style-name="T1">软件 → 攻击软件开发商或开源组件</text:span></text:p>
          <draw:enhanced-geometry svg:viewBox="0 0 21600 21600" draw:text-areas="800 800 20800 20800" draw:type="round-rectangular-callout" draw:modifiers="21393.4574735783 24039.60804538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page>
      <draw:page draw:name="page3" draw:style-name="dp1" draw:master-page-name="master-page3">
        <draw:frame draw:style-name="gr1" draw:text-style-name="P1" draw:layer="layout" svg:width="18.185cm" svg:height="25.729cm" svg:x="4cm" svg:y="0cm">
          <draw:image xlink:href="Pictures/1000000000000598000007EA0A688512.jpg" xlink:type="simple" xlink:show="embed" xlink:actuate="onLoad" draw:mime-type="image/jpeg">
            <text:p/>
          </draw:image>
        </draw:frame>
        <draw:custom-shape draw:style-name="gr2" draw:text-style-name="P3" draw:layer="layout" svg:width="5.96cm" svg:height="2.517cm" svg:x="0.461cm" svg:y="15.16cm">
          <text:p text:style-name="P4"><text:span text:style-name="T1">以前主要防外部攻击，现在还要防“内部人”，即使攻击者进入内网，也不能随意访问系统，因此要加强内部访问控制、定期查漏洞，并统一管理整个集团的安全。 </text:span></text:p>
          <draw:enhanced-geometry svg:viewBox="0 0 21600 21600" draw:text-areas="800 800 20800 20800" draw:type="round-rectangular-callout" draw:modifiers="21393.4574735783 31190.4686258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page>
      <draw:page draw:name="page4" draw:style-name="dp1" draw:master-page-name="master-page3">
        <draw:frame draw:style-name="gr1" draw:text-style-name="P1" draw:layer="layout" svg:width="18.185cm" svg:height="25.729cm" svg:x="4cm" svg:y="0cm">
          <draw:image xlink:href="Pictures/1000000000000598000007EA533A675F.jpg" xlink:type="simple" xlink:show="embed" xlink:actuate="onLoad" draw:mime-type="image/jpeg">
            <text:p/>
          </draw:image>
        </draw:frame>
        <draw:custom-shape draw:style-name="gr2" draw:text-style-name="P3" draw:layer="layout" svg:width="5.96cm" svg:height="7.953cm" svg:x="0.3cm" svg:y="0.532cm">
          <text:p text:style-name="P4"><text:span text:style-name="T1">B</text:span><text:span text:style-name="T1">（</text:span><text:span text:style-name="T1">Need to Know</text:span><text:span text:style-name="T1">）：员工只能访问完成工作所</text:span><text:span text:style-name="T1">**</text:span><text:span text:style-name="T1">需要知道（</text:span><text:span text:style-name="T1">Need to Know</text:span><text:span text:style-name="T1">）</text:span><text:span text:style-name="T1">**</text:span><text:span text:style-name="T1">的信息和系统，不授予超出业务需要的访问权限，从而降低信息泄露风险。</text:span></text:p>
          <text:p text:style-name="P4"><text:span text:style-name="T1">C</text:span><text:span text:style-name="T1">（デフォルトパスワード）：题干提到“同一型号设备通常共用的密码”，因此可判断为默认密码，应修改为难以猜测的密码。</text:span></text:p>
          <text:p text:style-name="P4"><text:span text:style-name="T1">D</text:span><text:span text:style-name="T1">（</text:span><text:span text:style-name="T1">SIEM</text:span><text:span text:style-name="T1">）：题干提到“分析日志以发现攻击征兆和尽早发现攻击”，因此可判断为</text:span><text:span text:style-name="T1">SIEM</text:span><text:span text:style-name="T1">，用于集中收集、关联分析日志，监测安全事件。</text:span></text:p>
          <draw:enhanced-geometry svg:viewBox="0 0 21600 21600" draw:text-areas="800 800 20800 20800" draw:type="round-rectangular-callout" draw:modifiers="19295.4202315048 24272.1649484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page>
      <draw:page draw:name="page5" draw:style-name="dp1" draw:master-page-name="master-page3">
        <draw:frame draw:style-name="gr1" draw:text-style-name="P1" draw:layer="layout" svg:width="18.185cm" svg:height="25.729cm" svg:x="4cm" svg:y="0cm">
          <draw:image xlink:href="Pictures/1000000000000598000007EAEF9A5467.jpg" xlink:type="simple" xlink:show="embed" xlink:actuate="onLoad" draw:mime-type="image/jpeg">
            <text:p/>
          </draw:image>
        </draw:frame>
        <draw:custom-shape draw:style-name="gr2" draw:text-style-name="P3" draw:layer="layout" svg:width="16.954cm" svg:height="4.687cm" svg:x="4.51cm" svg:y="20.159cm">
          <text:p text:style-name="P4"/>
          <text:p text:style-name="P4">T 主任が検討の結果をB 部長に報告したところ、③ソフトウェアサプライチェーン 攻撃への対策として“対策 9”に加えて実施すべき内容があると指摘された。そこで T 主任は、業務システムなどで使用しているソフトウェア製品及びライブラリについ て、名称, バージョン、開発会社名などを一覧にまとめた e を作成するこ とを、“対策 10" としてセキュリティ対策に追加することにした。</text:p>
          <text:p text:style-name="P4">这里就是考为什么要做一个SBOM，就直接背<text:line-break/>背一下脆弱性が発見された際に,影響範囲を迅速に判断できないこと</text:p>
          <text:p text:style-name="P4"><text:s/></text:p>
          <draw:enhanced-geometry svg:viewBox="0 0 21600 21600" draw:text-areas="800 800 20800 20800" draw:type="round-rectangular-callout" draw:modifiers="6270.43350044235 -4598.293515358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5.96cm" svg:height="12.283cm" svg:x="0.163cm" svg:y="0.98cm">
          <text:p text:style-name="P4"><text:span text:style-name="T1">①Z</text:span><text:span text:style-name="T1">社グループ全体の統制を強化しサプライチェーン攻撃のリスク又は被 害を低減する施策 </text:span></text:p>
          <text:p text:style-name="P4"><text:span text:style-name="T1">ア ✅ 开发前审查委托开发公司的安全措施。 属于供应链管理，正确。 </text:span></text:p>
          <text:p text:style-name="P4"><text:span text:style-name="T1">イ ✅ 集团统一制定安全事件报告和应对流程。 加强集团统制，正确。 </text:span></text:p>
          <text:p text:style-name="P4"><text:span text:style-name="T1">エ ✅ 集团统一网络设备配置策略。 统一安全策略，正确。 </text:span></text:p>
          <text:p text:style-name="P4"><text:span text:style-name="T1">ウ ❌（答案） 把各公司的业务系统放到同一个网络段（セグメント</text:span><text:span text:style-name="T1">G</text:span><text:span text:style-name="T1">），但仍由各公司各自管理。 </text:span></text:p>
          <text:p text:style-name="P4"><text:span text:style-name="T1">这没有实现题干要求的“由 </text:span><text:span text:style-name="T1">Z </text:span><text:span text:style-name="T1">社统一加强管理”，反而只是改变了网络位置，管理方式没有改变，也不能有效降低供应链攻击风险。</text:span></text:p>
          <text:p text:style-name="P4"><text:span text:style-name="T1"/></text:p>
          <draw:enhanced-geometry svg:viewBox="0 0 21600 21600" draw:text-areas="800 800 20800 20800" draw:type="round-rectangular-callout" draw:modifiers="30086.361348767 13557.14750895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6.631cm" svg:height="1.509cm" svg:x="1.074cm" svg:y="14.198cm">
          <text:p text:style-name="P4"><text:span text:style-name="T1">就直接回答 不正を行うと、発覚リストがあると分かっているから</text:span><text:span text:style-name="T1"><text:line-break/></text:span><text:span text:style-name="T1">ばれるなど、也可以</text:span></text:p>
          <draw:enhanced-geometry svg:viewBox="0 0 21600 21600" draw:text-areas="800 800 20800 20800" draw:type="round-rectangular-callout" draw:modifiers="19906.3932448733 25834.1721854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 draw:text-style-name="P3" draw:layer="layout" svg:width="6.631cm" svg:height="4.027cm" svg:x="0.575cm" svg:y="16.04cm">
          <text:p text:style-name="P4"><text:span text:style-name="T3"><text:s text:c="2"/>業務システムやインターネットへのアクセスログが記録されているこ とを </text:span><text:span text:style-name="T3">Z </text:span><text:span text:style-name="T3">社グループ各社の従業員に周知し、②データの持出しなどの内部不 正を抑止する。 <text:s text:c="2"/></text:span><text:span text:style-name="T1"><text:line-break/></text:span><text:span text:style-name="T1">就直接回答 不正を行うと、発覚リストがあると分かっているから</text:span><text:span text:style-name="T1"><text:line-break/></text:span><text:span text:style-name="T1">ばれるなど、也可以</text:span></text:p>
          <draw:enhanced-geometry svg:viewBox="0 0 21600 21600" draw:text-areas="800 800 20800 20800" draw:mirror-horizontal="false" draw:mirror-vertical="false" draw:type="round-rectangular-callout" draw:modifiers="23528.1061519904 1608.73882820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Noto Sans" svg:font-family="'Noto Sans'" style:font-family-generic="roman" style:font-pitch="variable"/>
    <style:font-face style:name="Noto Sans JP" svg:font-family="'Noto Sans JP'" style:font-family-generic="system" style:font-pitch="variable"/>
    <style:font-face style:name="Tahoma" svg:font-family="Tahoma"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0cm" fo:margin-left="0cm" fo:margin-right="0cm" fo:page-width="18.186cm" fo:page-height="25.7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print-date>2026-07-19T11:56:00.666549800</meta:print-date>
    <meta:printed-by>PDFファイル</meta:printed-by>
    <dc:date>2026-07-19T11:56:07.174993900</dc:date>
    <meta:editing-duration>PT6S</meta:editing-duration>
    <meta:editing-cycles>1</meta:editing-cycles>
    <meta:document-statistic meta:object-count="16"/>
    <meta:generator>LibreOffice/26.2.4.2$Windows_X86_64 LibreOffice_project/0229ac93fcf0d7cbc6376066c6f35021cef002dc</meta:generator>
  </office:meta>
</office:document-meta>
</file>